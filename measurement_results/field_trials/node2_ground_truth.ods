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node_count</text:p>
          </table:table-cell>
          <table:table-cell table:style-name="ce13" office:value-type="string" calcext:value-type="string">
            <text:p>ping_interval</text:p>
          </table:table-cell>
          <table:table-cell table:style-name="ce13" office:value-type="string" calcext:value-type="string">
            <text:p>distance_cm</text:p>
          </table:table-cell>
          <table:table-cell table:style-name="ce13" office:value-type="string" calcext:value-type="string">
            <text:p>local_sent_packets</text:p>
          </table:table-cell>
          <table:table-cell table:style-name="ce13" office:value-type="string" calcext:value-type="string">
            <text:p>remote_received_packets</text:p>
          </table:table-cell>
          <table:table-cell table:style-name="ce16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2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3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4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5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6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7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8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9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10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11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12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13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14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15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16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17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18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19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20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D21]" office:value-type="float" office:value="195" calcext:value-type="float">
            <text:p>19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 table:number-rows-repeated="9">
          <table:table-cell table:style-name="ce15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node_count</text:p>
          </table:table-cell>
          <table:table-cell table:style-name="ce13" office:value-type="string" calcext:value-type="string">
            <text:p>ping_interval</text:p>
          </table:table-cell>
          <table:table-cell table:style-name="ce13" office:value-type="string" calcext:value-type="string">
            <text:p>distance_cm</text:p>
          </table:table-cell>
          <table:table-cell table:style-name="ce13" office:value-type="string" calcext:value-type="string">
            <text:p>local_sent_packets</text:p>
          </table:table-cell>
          <table:table-cell table:style-name="ce13" office:value-type="string" calcext:value-type="string">
            <text:p>remote_received_packets</text:p>
          </table:table-cell>
          <table:table-cell table:style-name="ce16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3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4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5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6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7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8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9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10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11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" calcext:value-type="float">
            <text:p>5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12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" calcext:value-type="float">
            <text:p>5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13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" calcext:value-type="float">
            <text:p>5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14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" calcext:value-type="float">
            <text:p>5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15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" calcext:value-type="float">
            <text:p>5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16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17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18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19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0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1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2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3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4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5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6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7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8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29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30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D31]" office:value-type="float" office:value="39" calcext:value-type="float">
            <text:p>3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node_count</text:p>
          </table:table-cell>
          <table:table-cell table:style-name="ce13" office:value-type="string" calcext:value-type="string">
            <text:p>ping_interval</text:p>
          </table:table-cell>
          <table:table-cell table:style-name="ce13" office:value-type="string" calcext:value-type="string">
            <text:p>distance_cm</text:p>
          </table:table-cell>
          <table:table-cell table:style-name="ce13" office:value-type="string" calcext:value-type="string">
            <text:p>local_sent_packets</text:p>
          </table:table-cell>
          <table:table-cell table:style-name="ce13" office:value-type="string" calcext:value-type="string">
            <text:p>remote_received_packets</text:p>
          </table:table-cell>
          <table:table-cell table:style-name="ce16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3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4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5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6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7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8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9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10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11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12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13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14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15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16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800" calcext:value-type="float">
            <text:p>8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17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800" calcext:value-type="float">
            <text:p>8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18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800" calcext:value-type="float">
            <text:p>8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19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800" calcext:value-type="float">
            <text:p>8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0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800" calcext:value-type="float">
            <text:p>8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1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2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3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4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5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6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7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8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29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30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D31]" office:value-type="float" office:value="24" calcext:value-type="float">
            <text:p>24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node_count</text:p>
          </table:table-cell>
          <table:table-cell table:style-name="ce13" office:value-type="string" calcext:value-type="string">
            <text:p>ping_interval</text:p>
          </table:table-cell>
          <table:table-cell table:style-name="ce13" office:value-type="string" calcext:value-type="string">
            <text:p>distance_cm</text:p>
          </table:table-cell>
          <table:table-cell table:style-name="ce13" office:value-type="string" calcext:value-type="string">
            <text:p>local_sent_packets</text:p>
          </table:table-cell>
          <table:table-cell table:style-name="ce13" office:value-type="string" calcext:value-type="string">
            <text:p>remote_received_packets</text:p>
          </table:table-cell>
          <table:table-cell table:style-name="ce16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4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5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6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7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8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9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10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11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12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13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14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15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16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17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18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19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0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1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2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3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4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5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6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7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8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29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0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1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2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3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4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5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6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8" office:value-type="float" office:value="21000" calcext:value-type="float">
            <text:p>21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7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8" office:value-type="float" office:value="21000" calcext:value-type="float">
            <text:p>21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8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8" office:value-type="float" office:value="21000" calcext:value-type="float">
            <text:p>21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39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8" office:value-type="float" office:value="21000" calcext:value-type="float">
            <text:p>21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40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8" office:value-type="float" office:value="21000" calcext:value-type="float">
            <text:p>21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D41]" office:value-type="float" office:value="15" calcext:value-type="float">
            <text:p>15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node_count</text:p>
          </table:table-cell>
          <table:table-cell table:style-name="ce13" office:value-type="string" calcext:value-type="string">
            <text:p>ping_interval</text:p>
          </table:table-cell>
          <table:table-cell table:style-name="ce13" office:value-type="string" calcext:value-type="string">
            <text:p>distance_cm</text:p>
          </table:table-cell>
          <table:table-cell table:style-name="ce13" office:value-type="string" calcext:value-type="string">
            <text:p>local_sent_packets</text:p>
          </table:table-cell>
          <table:table-cell table:style-name="ce13" office:value-type="string" calcext:value-type="string">
            <text:p>remote_received_packets</text:p>
          </table:table-cell>
          <table:table-cell table:style-name="ce16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4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5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6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7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8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9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10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11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12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13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14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15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16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17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18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19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0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1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2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3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4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5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6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7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8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29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0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1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2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3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4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5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6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8" office:value-type="float" office:value="21000" calcext:value-type="float">
            <text:p>21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7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8" office:value-type="float" office:value="21000" calcext:value-type="float">
            <text:p>21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8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8" office:value-type="float" office:value="21000" calcext:value-type="float">
            <text:p>21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39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8" office:value-type="float" office:value="21000" calcext:value-type="float">
            <text:p>21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40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8" office:value-type="float" office:value="21000" calcext:value-type="float">
            <text:p>2100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D41]" office:value-type="float" office:value="9" calcext:value-type="float">
            <text:p>9</text:p>
          </table:table-cell>
          <table:table-cell table:style-name="ce17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3:02:37.59285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5-03T13:03:03.232977684</dc:date>
    <meta:generator>LibreOffice/6.4.7.2$Linux_X86_64 LibreOffice_project/40$Build-2</meta:generator>
    <meta:editing-duration>PT13M21S</meta:editing-duration>
    <meta:editing-cycles>6</meta:editing-cycles>
    <meta:document-statistic meta:table-count="5" meta:cell-count="990" meta:object-count="0"/>
    <meta:user-defined meta:name="AppVersion">16.0300</meta:user-defined>
  </office:meta>
</office:document-meta>
</file>